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table="urn:oasis:names:tc:opendocument:xmlns:table:1.0" xmlns:fo="urn:oasis:names:tc:opendocument:xmlns:xsl-fo-compatible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table="urn:oasis:names:tc:opendocument:xmlns:table:1.0" xmlns:fo="urn:oasis:names:tc:opendocument:xmlns:xsl-fo-compatible:1.0" office:version="1.2">
  <office:automatic-styles/>
  <office:body>
    <office:text>
      <text:h text:style-name="Title" text:outline-level="1">Business Insights Report (EDA)</text:h>
      <text:p text:style-name="Heading">Objective</text:p>
      <text:p text:style-name="Body">To analyze the Bank Marketing Campaign dataset using Exploratory Data Analysis (EDA) to understand customer behavior, evaluate campaign performance, and recommend strategies to improve marketing ROI.</text:p>
      <text:p text:style-name="Heading">Key Insights</text:p>
      <text:p text:style-name="Body">The campaign achieved approximately 11.3% subscriptions, while 88.7% of customers did not subscribe. Married customers represented the largest customer group. Administrative staff, blue-collar workers, and technicians formed the biggest job categories. University graduates and high-school educated customers accounted for a major share of the customer base. Marketing contacts peaked in May and steadily declined in later months. Customers with housing loans slightly outnumbered those without housing loans.</text:p>
      <text:p text:style-name="Heading">Recommendations</text:p>
      <text:p text:style-name="Body">Allocate more budget to the highest-performing customer segments and communication channels. Focus on customer segmentation using job, education, and marital status. Reduce repeated contacts and personalize campaigns for high-potential customers to improve conversion rates and ROI.</text:p>
      <text:p text:style-name="Heading">Conclusion</text:p>
      <text:p text:style-name="Body">The dashboard highlights opportunities to improve marketing efficiency through targeted campaigns, optimized budget allocation, and data-driven decision-making. These recommendations can help increase customer subscriptions while reducing unnecessary marketing costs.</text:p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table="urn:oasis:names:tc:opendocument:xmlns:table:1.0" xmlns:fo="urn:oasis:names:tc:opendocument:xmlns:xsl-fo-compatible:1.0" office:version="1.2">
  <office:styles>
    <style:style style:name="Title" style:family="paragraph" style:display-name="Title">
      <style:text-properties fo:font-size="18pt" fo:font-weight="bold"/>
      <style:paragraph-properties fo:text-align="center"/>
    </style:style>
    <style:style style:name="Heading" style:family="paragraph" style:display-name="Heading">
      <style:text-properties fo:font-size="14pt" fo:font-weight="bold"/>
    </style:style>
    <style:style style:name="Body" style:family="paragraph" style:display-name="Body">
      <style:text-properties fo:font-size="11pt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table="urn:oasis:names:tc:opendocument:xmlns:table:1.0" xmlns:fo="urn:oasis:names:tc:opendocument:xmlns:xsl-fo-compatible:1.0" office:version="1.2">
  <office:meta>
    <meta:generator>ODFPY/1.4.1</meta:generator>
  </office:meta>
</office:document-meta>
</file>